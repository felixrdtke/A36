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7C0000011A776EED92.png" manifest:media-type="image/png"/>
  <manifest:file-entry manifest:full-path="Pictures/100000010000020A0000014207AF7718.png" manifest:media-type="image/png"/>
  <manifest:file-entry manifest:full-path="Pictures/10000001000002B900000267B608CE96.png" manifest:media-type="image/png"/>
  <manifest:file-entry manifest:full-path="Pictures/10000001000002B3000002690EC11351.png" manifest:media-type="image/png"/>
  <manifest:file-entry manifest:full-path="Pictures/10000001000002CE000002697CC4679A.png" manifest:media-type="image/png"/>
  <manifest:file-entry manifest:full-path="Pictures/10000001000002A50000025AFBC334CC.png" manifest:media-type="image/png"/>
  <manifest:file-entry manifest:full-path="Pictures/10000001000002BE00000274ABAB8C0E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3235d" officeooo:paragraph-rsid="0003235d"/>
    </style:style>
    <style:style style:name="P2" style:family="paragraph" style:parent-style-name="Heading_20_1">
      <style:paragraph-properties fo:break-before="page"/>
      <style:text-properties officeooo:rsid="0003235d" officeooo:paragraph-rsid="0003235d"/>
    </style:style>
    <style:style style:name="P3" style:family="paragraph" style:parent-style-name="Text_20_body">
      <style:text-properties officeooo:rsid="0005c700" officeooo:paragraph-rsid="0005c700"/>
    </style:style>
    <style:style style:name="T1" style:family="text">
      <style:text-properties officeooo:rsid="0005f518"/>
    </style:style>
    <style:style style:name="T2" style:family="text">
      <style:text-properties officeooo:rsid="00078257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2026 07 14</text:h>
      <text:p text:style-name="P1">Initial reproduction of paper</text:p>
      <text:h text:style-name="P2" text:outline-level="1">2026 07 16</text:h>
      <text:p text:style-name="P1">Balancing of NFETS and PFETS</text:p>
      <text:p text:style-name="P1"><draw:frame draw:style-name="fr1" draw:name="Bild2" text:anchor-type="as-char" svg:width="7.549cm" svg:height="4.657cm" draw:z-index="1"><draw:image xlink:href="Pictures/100000010000020A0000014207AF7718.png" xlink:type="simple" xlink:show="embed" xlink:actuate="onLoad" draw:mime-type="image/png"/></draw:frame></text:p>
      <text:p text:style-name="P1"><draw:frame draw:style-name="fr1" draw:name="Bild1" text:anchor-type="as-char" svg:width="5.623cm" svg:height="5.022cm" draw:z-index="0"><draw:image xlink:href="Pictures/10000001000002B3000002690EC11351.png" xlink:type="simple" xlink:show="embed" xlink:actuate="onLoad" draw:mime-type="image/png"/></draw:frame><draw:frame draw:style-name="fr2" draw:name="Bild3" text:anchor-type="as-char" svg:width="5.547cm" svg:height="4.895cm" draw:z-index="2"><draw:image xlink:href="Pictures/10000001000002B900000267B608CE96.png" xlink:type="simple" xlink:show="embed" xlink:actuate="onLoad" draw:mime-type="image/png"/></draw:frame><draw:frame draw:style-name="fr1" draw:name="Bild4" text:anchor-type="as-char" svg:width="5.533cm" svg:height="4.921cm" draw:z-index="3"><draw:image xlink:href="Pictures/10000001000002A50000025AFBC334CC.png" xlink:type="simple" xlink:show="embed" xlink:actuate="onLoad" draw:mime-type="image/png"/></draw:frame></text:p>
      <text:p text:style-name="P1">UGBW ~2MHz</text:p>
      <text:p text:style-name="P1"><draw:frame draw:style-name="fr1" draw:name="Bild7" text:anchor-type="as-char" svg:width="5.073cm" svg:height="3.764cm" draw:z-index="6"><draw:image xlink:href="Pictures/100000010000017C0000011A776EED92.png" xlink:type="simple" xlink:show="embed" xlink:actuate="onLoad" draw:mime-type="image/png"/></draw:frame></text:p>
      <text:p text:style-name="P1"><draw:frame draw:style-name="fr1" draw:name="Bild5" text:anchor-type="as-char" svg:width="7.477cm" svg:height="6.426cm" draw:z-index="4"><draw:image xlink:href="Pictures/10000001000002CE000002697CC4679A.png" xlink:type="simple" xlink:show="embed" xlink:actuate="onLoad" draw:mime-type="image/png"/></draw:frame><draw:frame draw:style-name="fr1" draw:name="Bild6" text:anchor-type="as-char" svg:width="7.317cm" svg:height="6.544cm" draw:z-index="5"><draw:image xlink:href="Pictures/10000001000002BE00000274ABAB8C0E.png" xlink:type="simple" xlink:show="embed" xlink:actuate="onLoad" draw:mime-type="image/png"/></draw:frame></text:p>
      <text:p text:style-name="P3">Aim: improve speed and gain. <text:span text:style-name="T1">Trade </text:span><text:span text:style-name="T2">power and</text:span><text:span text:style-name="T1"> some headroom if necessary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G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7-16T19:50:34.161716700</meta:creation-date>
    <dc:date>2026-07-16T19:59:43.104673500</dc:date>
    <meta:editing-duration>PT9M7S</meta:editing-duration>
    <meta:editing-cycles>6</meta:editing-cycles>
    <meta:generator>LibreOffice/26.2.4.2$Windows_X86_64 LibreOffice_project/0229ac93fcf0d7cbc6376066c6f35021cef002dc</meta:generator>
    <meta:document-statistic meta:table-count="0" meta:image-count="7" meta:object-count="0" meta:page-count="2" meta:paragraph-count="10" meta:word-count="34" meta:character-count="187" meta:non-whitespace-character-count="160"/>
  </office:meta>
</office:document-meta>
</file>